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DATABASE library_management;</text:p>
      <text:p text:style-name="Normal"/>
      <text:p text:style-name="Normal">USE library_management;</text:p>
      <text:p text:style-name="Normal"/>
      <text:p text:style-name="Normal">CREATE TABLE Books (</text:p>
      <text:p text:style-name="Normal"><text:s text:c="4"/>book_id INT PRIMARY KEY,</text:p>
      <text:p text:style-name="Normal"><text:s text:c="4"/>title VARCHAR(100),</text:p>
      <text:p text:style-name="Normal"><text:s text:c="4"/>author VARCHAR(100),</text:p>
      <text:p text:style-name="Normal"><text:s text:c="4"/>category VARCHAR(50),</text:p>
      <text:p text:style-name="Normal"><text:s text:c="4"/>available_copies INT</text:p>
      <text:p text:style-name="Normal">);</text:p>
      <text:p text:style-name="Normal"/>
      <text:p text:style-name="Normal">CREATE TABLE Members (</text:p>
      <text:p text:style-name="Normal"><text:s text:c="4"/>member_id INT PRIMARY KEY,</text:p>
      <text:p text:style-name="Normal"><text:s text:c="4"/>member_name VARCHAR(100),</text:p>
      <text:p text:style-name="Normal"><text:s text:c="4"/>phone VARCHAR(15),</text:p>
      <text:p text:style-name="Normal"><text:s text:c="4"/>join_date DATE</text:p>
      <text:p text:style-name="Normal">);</text:p>
      <text:p text:style-name="Normal"/>
      <text:p text:style-name="Normal">CREATE TABLE Borrowed_Books (</text:p>
      <text:p text:style-name="Normal"><text:s text:c="4"/>borrow_id INT PRIMARY KEY,</text:p>
      <text:p text:style-name="Normal"><text:s text:c="4"/>member_id INT,</text:p>
      <text:p text:style-name="Normal"><text:s text:c="4"/>book_id INT,</text:p>
      <text:p text:style-name="Normal"><text:s text:c="4"/>borrow_date DATE,</text:p>
      <text:p text:style-name="Normal"><text:s text:c="4"/>return_date DATE,</text:p>
      <text:p text:style-name="Normal"><text:s text:c="4"/>FOREIGN KEY (member_id) REFERENCES Members(member_id),</text:p>
      <text:p text:style-name="Normal"><text:s text:c="4"/>FOREIGN KEY (book_id) REFERENCES Books(book_id)</text:p>
      <text:p text:style-name="Normal">);</text:p>
      <text:soft-page-break/>
      <text:p text:style-name="Normal">INSERT INTO Books VALUES</text:p>
      <text:p text:style-name="Normal">(201, 'Clean Code', 'Robert C. Martin', 'Programming', 4),</text:p>
      <text:p text:style-name="Normal">(202, 'The Pragmatic Programmer', 'Andrew Hunt', 'Programming', 5),</text:p>
      <text:p text:style-name="Normal">(203, 'Introduction to Algorithms', 'Thomas H. Cormen', 'Technology', 3),</text:p>
      <text:p text:style-name="Normal">(204, 'Atomic Habits', 'James Clear', 'Self Help', 6),</text:p>
      <text:p text:style-name="Normal">(205, 'Rich Dad Poor Dad', 'Robert Kiyosaki', 'Finance', 2);</text:p>
      <text:p text:style-name="Normal"/>
      <text:p text:style-name="Normal">INSERT INTO Members VALUES</text:p>
      <text:p text:style-name="Normal">(101, 'Karthik', '9876501111', '2025-01-15'),</text:p>
      <text:p text:style-name="Normal">(102, 'Ananya', '9876502222', '2025-02-10'),</text:p>
      <text:p text:style-name="Normal">(103, 'Surya', '9876503333', '2025-03-05'),</text:p>
      <text:p text:style-name="Normal">(104, 'Nisha', '9876504444', '2025-04-12'),</text:p>
      <text:p text:style-name="Normal">(105, 'Harish', '9876505555', '2025-05-08');</text:p>
      <text:p text:style-name="Normal"/>
      <text:p text:style-name="Normal">INSERT INTO Borrowed_Books VALUES</text:p>
      <text:p text:style-name="Normal">(1, 101, 201, '2025-06-01', '2025-06-10'),</text:p>
      <text:p text:style-name="Normal">(2, 102, 204, '2025-06-03', '2025-06-12'),</text:p>
      <text:p text:style-name="Normal">(3, 103, 202, '2025-06-05', '2025-06-15'),</text:p>
      <text:p text:style-name="Normal">(4, 104, 205, '2025-06-08', '2025-06-18'),</text:p>
      <text:p text:style-name="Normal">(5, 105, 203, '2025-06-10', '2025-06-20'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.Sivathmika Masilamani</meta:initial-creator>
    <dc:creator>M.Sivathmika Masilamani</dc:creator>
    <meta:creation-date>2026-06-30T06:24:00Z</meta:creation-date>
    <dc:date>2026-06-30T06:25:00Z</dc:date>
    <meta:template xlink:href="Normal" xlink:type="simple"/>
    <meta:editing-cycles>1</meta:editing-cycles>
    <meta:editing-duration>PT60S</meta:editing-duration>
    <meta:document-statistic meta:page-count="2" meta:paragraph-count="2" meta:word-count="215" meta:character-count="1443" meta:row-count="10" meta:non-whitespace-character-count="1230"/>
  </office:meta>
</office:document-meta>
</file>